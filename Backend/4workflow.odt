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r project structure is already heading in a good direction for a hackathon-to-scalable architecture.</text:p>
      <text:p text:style-name="Text_20_body">You currently have a clean separation of:</text:p>
      <text:list text:style-name="L1">
        <text:list-item>
          <text:p text:style-name="P5">config </text:p>
        </text:list-item>
        <text:list-item>
          <text:p text:style-name="P5">controllers </text:p>
        </text:list-item>
        <text:list-item>
          <text:p text:style-name="P5">routes </text:p>
        </text:list-item>
        <text:list-item>
          <text:p text:style-name="P4">services </text:p>
        </text:list-item>
      </text:list>
      <text:p text:style-name="Text_20_body">which is excellent.</text:p>
      <text:p text:style-name="Text_20_body">But now that you are adding:</text:p>
      <text:list text:style-name="L2">
        <text:list-item>
          <text:p text:style-name="P7">authentication </text:p>
        </text:list-item>
        <text:list-item>
          <text:p text:style-name="P7">user roles </text:p>
        </text:list-item>
        <text:list-item>
          <text:p text:style-name="P7">admin system </text:p>
        </text:list-item>
        <text:list-item>
          <text:p text:style-name="P7">frontend login </text:p>
        </text:list-item>
        <text:list-item>
          <text:p text:style-name="P7">AI workflows </text:p>
        </text:list-item>
        <text:list-item>
          <text:p text:style-name="P6">Firebase auth/data </text:p>
        </text:list-item>
      </text:list>
      <text:p text:style-name="Text_20_body">you should restructure slightly before the codebase grows messy.</text:p>
      <text:p text:style-name="Horizontal_20_Line"/>
      <text:h text:style-name="Heading_20_1" text:outline-level="1">REVIEW OF YOUR CURRENT STRUCTURE</text:h>
      <text:p text:style-name="Text_20_body">Current strengths:</text:p>
      <text:list text:style-name="L3">
        <text:list-item>
          <text:p text:style-name="P9">good backend separation </text:p>
        </text:list-item>
        <text:list-item>
          <text:p text:style-name="P9">modular controllers/routes </text:p>
        </text:list-item>
        <text:list-item>
          <text:p text:style-name="P9">Firebase centralized </text:p>
        </text:list-item>
        <text:list-item>
          <text:p text:style-name="P9">n8n separated from backend </text:p>
        </text:list-item>
        <text:list-item>
          <text:p text:style-name="P8">frontend/backend split already exists </text:p>
        </text:list-item>
      </text:list>
      <text:p text:style-name="Text_20_body">Current weaknesses:</text:p>
      <text:list text:style-name="L4">
        <text:list-item>
          <text:p text:style-name="P11">no models/schemas structure </text:p>
        </text:list-item>
        <text:list-item>
          <text:p text:style-name="P11">no middleware folder </text:p>
        </text:list-item>
        <text:list-item>
          <text:p text:style-name="P11">no auth separation </text:p>
        </text:list-item>
        <text:list-item>
          <text:p text:style-name="P11">no utilities/helpers </text:p>
        </text:list-item>
        <text:list-item>
          <text:p text:style-name="P11">no validation layer </text:p>
        </text:list-item>
        <text:list-item>
          <text:p text:style-name="P11">no dedicated user/admin modules </text:p>
        </text:list-item>
        <text:list-item>
          <text:p text:style-name="P11">no environment/config separation </text:p>
        </text:list-item>
        <text:list-item>
          <text:p text:style-name="P10">AI workflow mixed in root </text:p>
        </text:list-item>
      </text:list>
      <text:p text:style-name="Horizontal_20_Line"/>
      <text:h text:style-name="Heading_20_1" text:outline-level="1"><text:soft-page-break/>REVIEW OF YOUR LOGIN ALGORITHM</text:h>
      <text:p text:style-name="Text_20_body">Your idea is good overall, but I strongly recommend some architectural changes.</text:p>
      <text:p text:style-name="Horizontal_20_Line"/>
      <text:h text:style-name="Heading_20_1" text:outline-level="1">CURRENT FLOW (Your Version)</text:h>
      <text:section text:style-name="Sect1" text:name="code-block-viewer">
        <text:p text:style-name="P1"><text:span text:style-name="Source_20_Text">User enters:</text:span></text:p>
        <text:p text:style-name="Preformatted_20_Text"><text:span text:style-name="Source_20_Text">- Name</text:span></text:p>
        <text:p text:style-name="Preformatted_20_Text"><text:span text:style-name="Source_20_Text">- Email</text:span></text:p>
        <text:p text:style-name="Preformatted_20_Text"><text:span text:style-name="Source_20_Text">- DOB</text:span></text:p>
        <text:p text:style-name="Preformatted_20_Text"><text:span text:style-name="Source_20_Text">- Password</text:span></text:p>
        <text:p text:style-name="Preformatted_20_Text"><text:span text:style-name="Source_20_Text">↓</text:span></text:p>
        <text:p text:style-name="Preformatted_20_Text"><text:span text:style-name="Source_20_Text">Generate custom ID</text:span></text:p>
        <text:p text:style-name="Preformatted_20_Text"><text:span text:style-name="Source_20_Text">Example:</text:span></text:p>
        <text:p text:style-name="Preformatted_20_Text"><text:span text:style-name="Source_20_Text">SaiT19</text:span></text:p>
        <text:p text:style-name="Preformatted_20_Text"><text:span text:style-name="Source_20_Text">↓</text:span></text:p>
        <text:p text:style-name="Preformatted_20_Text"><text:span text:style-name="Source_20_Text">Store in Firebase</text:span></text:p>
        <text:p text:style-name="Preformatted_20_Text"><text:span text:style-name="Source_20_Text">↓</text:span></text:p>
        <text:p text:style-name="Preformatted_20_Text"><text:span text:style-name="Source_20_Text">Login:</text:span></text:p>
        <text:p text:style-name="Preformatted_20_Text"><text:span text:style-name="Source_20_Text">- email/username + password</text:span></text:p>
        <text:p text:style-name="P3"><text:span text:style-name="Source_20_Text">- admin toggle switches database</text:span></text:p>
      </text:section>
      <text:p text:style-name="Horizontal_20_Line"/>
      <text:h text:style-name="Heading_20_1" text:outline-level="1">PROBLEMS WITH CURRENT DESIGN</text:h>
      <text:p text:style-name="Horizontal_20_Line"/>
      <text:h text:style-name="Heading_20_1" text:outline-level="1">1. DO NOT USE AGE INSIDE USER ID</text:h>
      <text:p text:style-name="Text_20_body">Example:</text:p>
      <text:section text:style-name="Sect1" text:name="Section1">
        <text:p text:style-name="P2"><text:bookmark text:name="code-block-viewer"/><text:span text:style-name="Source_20_Text">SaiT19</text:span></text:p>
      </text:section>
      <text:p text:style-name="Text_20_body">Problem:</text:p>
      <text:list text:style-name="L5">
        <text:list-item>
          <text:p text:style-name="P13">age changes every year </text:p>
        </text:list-item>
        <text:list-item>
          <text:p text:style-name="P13">user ID becomes inconsistent </text:p>
        </text:list-item>
        <text:list-item>
          <text:p text:style-name="P13">duplicate IDs possible </text:p>
        </text:list-item>
        <text:list-item>
          <text:p text:style-name="P12">privacy issue </text:p>
        </text:list-item>
      </text:list>
      <text:p text:style-name="Horizontal_20_Line"/>
      <text:h text:style-name="Heading_20_1" text:outline-level="1">BETTER</text:h>
      <text:p text:style-name="Text_20_body">Use:</text:p>
      <text:section text:style-name="Sect1" text:name="Section2">
        <text:p text:style-name="P2"><text:bookmark text:name="code-block-viewer Copy 1"/><text:span text:style-name="Source_20_Text">SAI_4821</text:span></text:p>
      </text:section>
      <text:p text:style-name="Text_20_body">or</text:p>
      <text:section text:style-name="Sect1" text:name="Section3">
        <text:p text:style-name="P2"><text:bookmark text:name="code-block-viewer Copy 2"/><text:soft-page-break/><text:span text:style-name="Source_20_Text">USR-8F3A2</text:span></text:p>
      </text:section>
      <text:p text:style-name="Text_20_body">Generated randomly.</text:p>
      <text:p text:style-name="Text_20_body">Stable forever.</text:p>
      <text:p text:style-name="Horizontal_20_Line"/>
      <text:h text:style-name="Heading_20_1" text:outline-level="1">2. DO NOT USE SEPARATE ADMIN DATABASE</text:h>
      <text:p text:style-name="Text_20_body">You said:</text:p>
      <text:section text:style-name="Sect1" text:name="Section4">
        <text:p text:style-name="P1"><text:bookmark text:name="code-block-viewer Copy 3"/><text:span text:style-name="Source_20_Text">admin database</text:span></text:p>
        <text:p text:style-name="P3"><text:span text:style-name="Source_20_Text">user database</text:span></text:p>
      </text:section>
      <text:p text:style-name="Text_20_body">This becomes painful later.</text:p>
      <text:p text:style-name="Horizontal_20_Line"/>
      <text:h text:style-name="Heading_20_1" text:outline-level="1">BETTER APPROACH</text:h>
      <text:p text:style-name="Text_20_body">Use ONE users collection:</text:p>
      <text:section text:style-name="Sect1" text:name="Section5">
        <text:p text:style-name="P2"><text:bookmark text:name="code-block-viewer Copy 4"/><text:span text:style-name="Source_20_Text">users</text:span></text:p>
      </text:section>
      <text:p text:style-name="Text_20_body">with role field:</text:p>
      <text:section text:style-name="Sect1" text:name="Section6">
        <text:p text:style-name="P1"><text:bookmark text:name="code-block-viewer Copy 5"/><text:span text:style-name="Source_20_Text">{</text:span></text:p>
        <text:p text:style-name="Preformatted_20_Text"><text:span text:style-name="Source_20_Text"><text:s text:c="2"/>"name": "Sai",</text:span></text:p>
        <text:p text:style-name="Preformatted_20_Text"><text:span text:style-name="Source_20_Text"><text:s text:c="2"/>"email": "sai@gmail.com",</text:span></text:p>
        <text:p text:style-name="Preformatted_20_Text"><text:span text:style-name="Source_20_Text"><text:s text:c="2"/>"password": "hashed",</text:span></text:p>
        <text:p text:style-name="Preformatted_20_Text"><text:span text:style-name="Source_20_Text"><text:s text:c="2"/>"role": "admin"</text:span></text:p>
        <text:p text:style-name="P3"><text:span text:style-name="Source_20_Text">}</text:span></text:p>
      </text:section>
      <text:p text:style-name="Text_20_body">or</text:p>
      <text:section text:style-name="Sect1" text:name="Section7">
        <text:p text:style-name="P1"><text:bookmark text:name="code-block-viewer Copy 6"/><text:span text:style-name="Source_20_Text">{</text:span></text:p>
        <text:p text:style-name="Preformatted_20_Text"><text:span text:style-name="Source_20_Text"><text:s text:c="2"/>"role": "user"</text:span></text:p>
        <text:p text:style-name="P3"><text:span text:style-name="Source_20_Text">}</text:span></text:p>
      </text:section>
      <text:p text:style-name="Text_20_body">Much cleaner.</text:p>
      <text:p text:style-name="Horizontal_20_Line"/>
      <text:h text:style-name="Heading_20_1" text:outline-level="1">3. NEVER STORE RAW PASSWORDS</text:h>
      <text:p text:style-name="Text_20_body">You MUST hash passwords.</text:p>
      <text:p text:style-name="Text_20_body">Use:</text:p>
      <text:section text:style-name="Sect1" text:name="Section8">
        <text:p text:style-name="P2"><text:bookmark text:name="code-block-viewer Copy 7"/><text:span text:style-name="Source_20_Text">bcryptjs</text:span></text:p>
      </text:section>
      <text:p text:style-name="Text_20_body">later.</text:p>
      <text:p text:style-name="Horizontal_20_Line"><text:soft-page-break/></text:p>
      <text:h text:style-name="Heading_20_1" text:outline-level="1">4. EMAIL SHOULD BE PRIMARY LOGIN</text:h>
      <text:p text:style-name="Text_20_body">Correct choice.</text:p>
      <text:p text:style-name="Text_20_body">Do NOT login with generated IDs.</text:p>
      <text:p text:style-name="Text_20_body">Generated ID is only display/public reference.</text:p>
      <text:p text:style-name="Horizontal_20_Line"/>
      <text:h text:style-name="Heading_20_1" text:outline-level="1">RECOMMENDED LOGIN FLOW</text:h>
      <text:p text:style-name="Horizontal_20_Line"/>
      <text:h text:style-name="Heading_20_1" text:outline-level="1">SIGNUP</text:h>
      <text:section text:style-name="Sect1" text:name="Section9">
        <text:p text:style-name="P1"><text:bookmark text:name="code-block-viewer Copy 8"/><text:span text:style-name="Source_20_Text">Name</text:span></text:p>
        <text:p text:style-name="Preformatted_20_Text"><text:span text:style-name="Source_20_Text">Email</text:span></text:p>
        <text:p text:style-name="Preformatted_20_Text"><text:span text:style-name="Source_20_Text">DOB</text:span></text:p>
        <text:p text:style-name="Preformatted_20_Text"><text:span text:style-name="Source_20_Text">Password</text:span></text:p>
        <text:p text:style-name="P3"><text:span text:style-name="Source_20_Text">Role (optional admin invite)</text:span></text:p>
      </text:section>
      <text:p text:style-name="Text_20_body">↓</text:p>
      <text:p text:style-name="Text_20_body">Backend:</text:p>
      <text:section text:style-name="Sect1" text:name="Section10">
        <text:p text:style-name="P1"><text:bookmark text:name="code-block-viewer Copy 9"/><text:span text:style-name="Source_20_Text">Hash Password</text:span></text:p>
        <text:p text:style-name="Preformatted_20_Text"><text:span text:style-name="Source_20_Text">Generate User ID</text:span></text:p>
        <text:p text:style-name="P3"><text:span text:style-name="Source_20_Text">Save User</text:span></text:p>
      </text:section>
      <text:p text:style-name="Text_20_body">↓</text:p>
      <text:p text:style-name="Text_20_body">Firebase:</text:p>
      <text:section text:style-name="Sect1" text:name="Section11">
        <text:p text:style-name="P1"><text:bookmark text:name="code-block-viewer Copy 10"/><text:span text:style-name="Source_20_Text">{</text:span></text:p>
        <text:p text:style-name="Preformatted_20_Text"><text:span text:style-name="Source_20_Text"><text:s text:c="2"/>"uid": "USR-3F82A",</text:span></text:p>
        <text:p text:style-name="Preformatted_20_Text"><text:span text:style-name="Source_20_Text"><text:s text:c="2"/>"name": "Sai",</text:span></text:p>
        <text:p text:style-name="Preformatted_20_Text"><text:span text:style-name="Source_20_Text"><text:s text:c="2"/>"email": "sai@gmail.com",</text:span></text:p>
        <text:p text:style-name="Preformatted_20_Text"><text:span text:style-name="Source_20_Text"><text:s text:c="2"/>"dob": "2005-08-20",</text:span></text:p>
        <text:p text:style-name="Preformatted_20_Text"><text:span text:style-name="Source_20_Text"><text:s text:c="2"/>"password": "hashed_password",</text:span></text:p>
        <text:p text:style-name="Preformatted_20_Text"><text:span text:style-name="Source_20_Text"><text:s text:c="2"/>"role": "user",</text:span></text:p>
        <text:p text:style-name="Preformatted_20_Text"><text:span text:style-name="Source_20_Text"><text:s text:c="2"/>"createdAt": ...</text:span></text:p>
        <text:p text:style-name="P3"><text:span text:style-name="Source_20_Text">}</text:span></text:p>
      </text:section>
      <text:p text:style-name="Horizontal_20_Line"/>
      <text:h text:style-name="Heading_20_1" text:outline-level="1">LOGIN</text:h>
      <text:section text:style-name="Sect1" text:name="Section12">
        <text:p text:style-name="P2"><text:bookmark text:name="code-block-viewer Copy 11"/><text:span text:style-name="Source_20_Text">Email + Password</text:span></text:p>
      </text:section>
      <text:p text:style-name="Text_20_body">↓</text:p>
      <text:p text:style-name="Text_20_body">Backend checks:</text:p>
      <text:list text:style-name="L6">
        <text:list-item>
          <text:p text:style-name="P15"><text:soft-page-break/>email exists? </text:p>
        </text:list-item>
        <text:list-item>
          <text:p text:style-name="P15">password valid? </text:p>
        </text:list-item>
        <text:list-item>
          <text:p text:style-name="P14">role? </text:p>
        </text:list-item>
      </text:list>
      <text:p text:style-name="Text_20_body">↓</text:p>
      <text:p text:style-name="Text_20_body">Success:</text:p>
      <text:list text:style-name="L7">
        <text:list-item>
          <text:p text:style-name="P16">generate JWT/session </text:p>
        </text:list-item>
      </text:list>
      <text:p text:style-name="Horizontal_20_Line"/>
      <text:h text:style-name="Heading_20_1" text:outline-level="1">ADMIN LOGIN</text:h>
      <text:p text:style-name="Text_20_body">NO TOGGLE NEEDED.</text:p>
      <text:p text:style-name="Text_20_body">Instead:</text:p>
      <text:section text:style-name="Sect1" text:name="Section13">
        <text:p text:style-name="P2"><text:bookmark text:name="code-block-viewer Copy 12"/><text:span text:style-name="Source_20_Text">role === "admin"</text:span></text:p>
      </text:section>
      <text:p text:style-name="Text_20_body">after login.</text:p>
      <text:p text:style-name="Text_20_body">Cleaner UX.</text:p>
      <text:p text:style-name="Text_20_body">More secure.</text:p>
      <text:p text:style-name="Horizontal_20_Line"/>
      <text:h text:style-name="Heading_20_1" text:outline-level="1">RECOMMENDED PROJECT STRUCTURE</text:h>
      <text:p text:style-name="Text_20_body">Now that auth is coming, restructure NOW before scaling.</text:p>
      <text:p text:style-name="Horizontal_20_Line"/>
      <text:h text:style-name="Heading_20_1" text:outline-level="1">RECOMMENDED STRUCTURE</text:h>
      <text:section text:style-name="Sect1" text:name="Section14">
        <text:p text:style-name="P1"><text:bookmark text:name="code-block-viewer Copy 13"/><text:span text:style-name="Source_20_Text">Backend/</text:span></text:p>
        <text:p text:style-name="Preformatted_20_Text"><text:span text:style-name="Source_20_Text">│</text:span></text:p>
        <text:p text:style-name="Preformatted_20_Text"><text:span text:style-name="Source_20_Text">├── src/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config/</text:span></text:p>
        <text:p text:style-name="Preformatted_20_Text"><text:span text:style-name="Source_20_Text">│ <text:s text:c="2"/>│ <text:s text:c="2"/>├── firebase.js</text:span></text:p>
        <text:p text:style-name="Preformatted_20_Text"><text:span text:style-name="Source_20_Text">│ <text:s text:c="2"/>│ <text:s text:c="2"/>└── env.js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controllers/</text:span></text:p>
        <text:p text:style-name="Preformatted_20_Text"><text:span text:style-name="Source_20_Text">│ <text:s text:c="2"/>│ <text:s text:c="2"/>├── auth.controller.js</text:span></text:p>
        <text:p text:style-name="Preformatted_20_Text"><text:span text:style-name="Source_20_Text">│ <text:s text:c="2"/>│ <text:s text:c="2"/>├── complaints.controller.js</text:span></text:p>
        <text:p text:style-name="Preformatted_20_Text"><text:span text:style-name="Source_20_Text">│ <text:s text:c="2"/>│ <text:s text:c="2"/>└── users.controller.js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routes/</text:span></text:p>
        <text:p text:style-name="Preformatted_20_Text"><text:span text:style-name="Source_20_Text">│ <text:s text:c="2"/>│ <text:s text:c="2"/>├── auth.routes.js</text:span></text:p>
        <text:p text:style-name="Preformatted_20_Text"><text:span text:style-name="Source_20_Text">│ <text:s text:c="2"/>│ <text:s text:c="2"/>├── complaints.routes.js</text:span></text:p>
        <text:p text:style-name="Preformatted_20_Text"><text:span text:style-name="Source_20_Text">│ <text:s text:c="2"/>│ <text:s text:c="2"/>└── users.routes.js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services/</text:span></text:p>
        <text:p text:style-name="Preformatted_20_Text"><text:span text:style-name="Source_20_Text">│ <text:s text:c="2"/>│ <text:s text:c="2"/>├── auth.service.js</text:span></text:p>
        <text:p text:style-name="Preformatted_20_Text"><text:span text:style-name="Source_20_Text">│ <text:s text:c="2"/>│ <text:s text:c="2"/>├── complaint.service.js</text:span></text:p>
        <text:p text:style-name="Preformatted_20_Text"><text:soft-page-break/><text:span text:style-name="Source_20_Text">│ <text:s text:c="2"/>│ <text:s text:c="2"/>└── user.service.js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middleware/</text:span></text:p>
        <text:p text:style-name="Preformatted_20_Text"><text:span text:style-name="Source_20_Text">│ <text:s text:c="2"/>│ <text:s text:c="2"/>├── auth.middleware.js</text:span></text:p>
        <text:p text:style-name="Preformatted_20_Text"><text:span text:style-name="Source_20_Text">│ <text:s text:c="2"/>│ <text:s text:c="2"/>├── admin.middleware.js</text:span></text:p>
        <text:p text:style-name="Preformatted_20_Text"><text:span text:style-name="Source_20_Text">│ <text:s text:c="2"/>│ <text:s text:c="2"/>└── error.middleware.js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utils/</text:span></text:p>
        <text:p text:style-name="Preformatted_20_Text"><text:span text:style-name="Source_20_Text">│ <text:s text:c="2"/>│ <text:s text:c="2"/>├── generateUserId.js</text:span></text:p>
        <text:p text:style-name="Preformatted_20_Text"><text:span text:style-name="Source_20_Text">│ <text:s text:c="2"/>│ <text:s text:c="2"/>├── hashPassword.js</text:span></text:p>
        <text:p text:style-name="Preformatted_20_Text"><text:span text:style-name="Source_20_Text">│ <text:s text:c="2"/>│ <text:s text:c="2"/>└── validators.js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models/</text:span></text:p>
        <text:p text:style-name="Preformatted_20_Text"><text:span text:style-name="Source_20_Text">│ <text:s text:c="2"/>│ <text:s text:c="2"/>├── user.model.js</text:span></text:p>
        <text:p text:style-name="Preformatted_20_Text"><text:span text:style-name="Source_20_Text">│ <text:s text:c="2"/>│ <text:s text:c="2"/>└── complaint.model.js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├── app.js</text:span></text:p>
        <text:p text:style-name="Preformatted_20_Text"><text:span text:style-name="Source_20_Text">│ <text:s text:c="2"/>└── server.js</text:span></text:p>
        <text:p text:style-name="Preformatted_20_Text"><text:span text:style-name="Source_20_Text">│</text:span></text:p>
        <text:p text:style-name="Preformatted_20_Text"><text:span text:style-name="Source_20_Text">├── workflows/</text:span></text:p>
        <text:p text:style-name="Preformatted_20_Text"><text:span text:style-name="Source_20_Text">│ <text:s text:c="2"/>└── roadwatch-ai-workflow.json</text:span></text:p>
        <text:p text:style-name="Preformatted_20_Text"><text:span text:style-name="Source_20_Text">│</text:span></text:p>
        <text:p text:style-name="Preformatted_20_Text"><text:span text:style-name="Source_20_Text">├── .env</text:span></text:p>
        <text:p text:style-name="Preformatted_20_Text"><text:span text:style-name="Source_20_Text">├── package.json</text:span></text:p>
        <text:p text:style-name="P3"><text:span text:style-name="Source_20_Text">└── README.md</text:span></text:p>
      </text:section>
      <text:p text:style-name="Horizontal_20_Line"/>
      <text:h text:style-name="Heading_20_1" text:outline-level="1">WHY EACH NEW FOLDER EXISTS</text:h>
      <text:p text:style-name="Horizontal_20_Line"/>
      <text:h text:style-name="Heading_20_1" text:outline-level="1">middleware/</text:h>
      <text:p text:style-name="Text_20_body">For:</text:p>
      <text:list text:style-name="L8">
        <text:list-item>
          <text:p text:style-name="P18">auth protection </text:p>
        </text:list-item>
        <text:list-item>
          <text:p text:style-name="P18">admin access </text:p>
        </text:list-item>
        <text:list-item>
          <text:p text:style-name="P17">centralized errors </text:p>
        </text:list-item>
      </text:list>
      <text:p text:style-name="Text_20_body">Example:</text:p>
      <text:section text:style-name="Sect1" text:name="Section15">
        <text:p text:style-name="P2"><text:bookmark text:name="code-block-viewer Copy 14"/><text:span text:style-name="Source_20_Text">Only admins can resolve complaints</text:span></text:p>
      </text:section>
      <text:p text:style-name="Horizontal_20_Line"/>
      <text:h text:style-name="Heading_20_1" text:outline-level="1">utils/</text:h>
      <text:p text:style-name="Text_20_body">Reusable helper logic.</text:p>
      <text:p text:style-name="Text_20_body">Example:</text:p>
      <text:list text:style-name="L9">
        <text:list-item>
          <text:p text:style-name="P20">generate user ID </text:p>
        </text:list-item>
        <text:list-item>
          <text:p text:style-name="P20">password hashing </text:p>
        </text:list-item>
        <text:list-item>
          <text:p text:style-name="P19">validation </text:p>
        </text:list-item>
      </text:list>
      <text:p text:style-name="Horizontal_20_Line"><text:soft-page-break/></text:p>
      <text:h text:style-name="Heading_20_1" text:outline-level="1">models/</text:h>
      <text:p text:style-name="Text_20_body">Even with Firebase, models help maintain structure.</text:p>
      <text:p text:style-name="Text_20_body">Example:</text:p>
      <text:section text:style-name="Sect1" text:name="Section16">
        <text:p text:style-name="P1"><text:bookmark text:name="code-block-viewer Copy 15"/><text:span text:style-name="Source_20_Text">const userSchema = {</text:span></text:p>
        <text:p text:style-name="Preformatted_20_Text"><text:span text:style-name="Source_20_Text"><text:s text:c="2"/>name: "",</text:span></text:p>
        <text:p text:style-name="Preformatted_20_Text"><text:span text:style-name="Source_20_Text"><text:s text:c="2"/>email: "",</text:span></text:p>
        <text:p text:style-name="P3"><text:span text:style-name="Source_20_Text">}</text:span></text:p>
      </text:section>
      <text:p text:style-name="Text_20_body">Makes scaling MUCH easier.</text:p>
      <text:p text:style-name="Horizontal_20_Line"/>
      <text:h text:style-name="Heading_20_1" text:outline-level="1">auth/</text:h>
      <text:p text:style-name="Text_20_body">Authentication deserves separate:</text:p>
      <text:list text:style-name="L10">
        <text:list-item>
          <text:p text:style-name="P22">controller </text:p>
        </text:list-item>
        <text:list-item>
          <text:p text:style-name="P22">routes </text:p>
        </text:list-item>
        <text:list-item>
          <text:p text:style-name="P21">services </text:p>
        </text:list-item>
      </text:list>
      <text:p text:style-name="Text_20_body">Never mix auth with complaint logic.</text:p>
      <text:p text:style-name="Horizontal_20_Line"/>
      <text:h text:style-name="Heading_20_1" text:outline-level="1">workflows/</text:h>
      <text:p text:style-name="Text_20_body">Move AI workflows out of root.</text:p>
      <text:p text:style-name="Text_20_body">Cleaner repo.</text:p>
      <text:p text:style-name="Horizontal_20_Line"/>
      <text:h text:style-name="Heading_20_1" text:outline-level="1">FUTURE FEATURES THIS STRUCTURE SUPPORTS</text:h>
      <text:p text:style-name="Text_20_body">Later you can easily add:</text:p>
      <text:list text:style-name="L11">
        <text:list-item>
          <text:p text:style-name="P24">JWT auth </text:p>
        </text:list-item>
        <text:list-item>
          <text:p text:style-name="P24">live complaint tracking </text:p>
        </text:list-item>
        <text:list-item>
          <text:p text:style-name="P24">AI severity prediction </text:p>
        </text:list-item>
        <text:list-item>
          <text:p text:style-name="P24">image uploads </text:p>
        </text:list-item>
        <text:list-item>
          <text:p text:style-name="P24">admin dashboard </text:p>
        </text:list-item>
        <text:list-item>
          <text:p text:style-name="P24">analytics </text:p>
        </text:list-item>
        <text:list-item>
          <text:p text:style-name="P24">notifications </text:p>
        </text:list-item>
        <text:list-item>
          <text:p text:style-name="P24">geolocation </text:p>
        </text:list-item>
        <text:list-item>
          <text:p text:style-name="P23"><text:soft-page-break/>ML models </text:p>
        </text:list-item>
      </text:list>
      <text:p text:style-name="Text_20_body">without rewriting backend.</text:p>
      <text:p text:style-name="Horizontal_20_Line"/>
      <text:h text:style-name="Heading_20_1" text:outline-level="1">IMPORTANT RECOMMENDATION</text:h>
      <text:p text:style-name="Text_20_body">For authentication:</text:p>
      <text:p text:style-name="Text_20_body">DO NOT build auth manually from scratch long-term.</text:p>
      <text:p text:style-name="Text_20_body">Eventually use:</text:p>
      <text:p text:style-name="Text_20_body">Firebase Authentication</text:p>
      <text:p text:style-name="Text_20_body">because it gives:</text:p>
      <text:list text:style-name="L12">
        <text:list-item>
          <text:p text:style-name="P26">secure login </text:p>
        </text:list-item>
        <text:list-item>
          <text:p text:style-name="P26">password reset </text:p>
        </text:list-item>
        <text:list-item>
          <text:p text:style-name="P26">email verification </text:p>
        </text:list-item>
        <text:list-item>
          <text:p text:style-name="P26">JWT tokens </text:p>
        </text:list-item>
        <text:list-item>
          <text:p text:style-name="P25">social login </text:p>
        </text:list-item>
      </text:list>
      <text:p text:style-name="Text_20_body">But for learning/hackathon:<text:line-break/>your custom auth approach is completely fine.</text:p>
      <text:p text:style-name="Horizontal_20_Line"/>
      <text:h text:style-name="Heading_20_1" text:outline-level="1">MY RECOMMENDED NEXT STEP</text:h>
      <text:p text:style-name="Text_20_body">Before coding:</text:p>
      <text:list text:style-name="L13">
        <text:list-item>
          <text:p text:style-name="P28">restructure folders </text:p>
        </text:list-item>
        <text:list-item>
          <text:p text:style-name="P28">create auth architecture </text:p>
        </text:list-item>
        <text:list-item>
          <text:p text:style-name="P28">define Firebase collections </text:p>
        </text:list-item>
        <text:list-item>
          <text:p text:style-name="P28">define user schema </text:p>
        </text:list-item>
        <text:list-item>
          <text:p text:style-name="P27">define auth flow </text:p>
        </text:list-item>
      </text:list>
      <text:p text:style-name="Text_20_body">THEN start coding login/signup.</text:p>
      <text:p text:style-name="Text_20_body">Your current backend foundation is already solid enough to scale into a serious projec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20:26:59.081151629</meta:creation-date>
    <dc:date>2026-05-18T21:45:06.352039693</dc:date>
    <meta:editing-duration>PT1H4M19S</meta:editing-duration>
    <meta:editing-cycles>1</meta:editing-cycles>
    <meta:document-statistic meta:table-count="0" meta:image-count="0" meta:object-count="0" meta:page-count="8" meta:paragraph-count="247" meta:word-count="729" meta:character-count="4540" meta:non-whitespace-character-count="3918"/>
    <meta:generator>LibreOffice/24.2.7.2$Linux_X86_64 LibreOffice_project/420$Build-2</meta:generator>
  </office:meta>
</office:document-meta>
</file>